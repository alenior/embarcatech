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text-align="justify" style:justify-single-word="false" loext:word-spacing-minimum="75%" loext:word-spacing-maximum="133%"/>
      <style:text-properties officeooo:rsid="000e8849" officeooo:paragraph-rsid="000e8849"/>
    </style:style>
    <style:style style:name="P2" style:family="paragraph" style:parent-style-name="List_20_Paragraph" style:list-style-name="WWNum3">
      <style:paragraph-properties fo:text-align="justify" style:justify-single-word="false" loext:word-spacing-minimum="75%" loext:word-spacing-maximum="133%"/>
    </style:style>
    <style:style style:name="P3" style:family="paragraph" style:parent-style-name="List_20_Paragraph">
      <style:paragraph-properties fo:margin-left="2.021cm" fo:text-align="justify" style:justify-single-word="false" loext:word-spacing-minimum="75%" loext:word-spacing-maximum="133%"/>
    </style:style>
    <style:style style:name="P4" style:family="paragraph" style:parent-style-name="List_20_Paragraph" style:list-style-name="WWNum3"/>
    <style:style style:name="P5" style:family="paragraph" style:parent-style-name="List_20_Paragraph">
      <style:paragraph-properties fo:margin-left="2.021cm"/>
    </style:style>
    <style:style style:name="P6" style:family="paragraph" style:parent-style-name="List_20_Paragraph" style:list-style-name="WWNum4">
      <style:paragraph-properties fo:text-align="justify" style:justify-single-word="false" loext:word-spacing-minimum="75%" loext:word-spacing-maximum="133%"/>
    </style:style>
    <style:style style:name="P7" style:family="paragraph" style:parent-style-name="List_20_Paragraph" style:list-style-name="WWNum4"/>
    <style:style style:name="P8" style:family="paragraph" style:parent-style-name="List_20_Paragraph">
      <style:paragraph-properties fo:text-align="justify" style:justify-single-word="false" loext:word-spacing-minimum="75%" loext:word-spacing-maximum="133%"/>
    </style:style>
    <style:style style:name="T1" style:family="text">
      <style:text-properties fo:color="#ff0000" loext:opacity="100%" officeooo:rsid="000dfdad"/>
    </style:style>
    <style:style style:name="T2" style:family="text">
      <style:text-properties fo:color="#ff0000" loext:opacity="100%" officeooo:rsid="000e8849"/>
    </style:style>
    <style:style style:name="T3" style:family="text">
      <style:text-properties fo:color="#ff0000" loext:opacity="100%" officeooo:rsid="000f3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header>
          <text:p text:style-name="P1">JOSÉ DE ALENCAR DE SOUSA JÚNIOR 00492573310</text:p>
          <text:p text:style-name="P2"/>
        </text:list-header>
        <text:list-item>
          <text:p text:style-name="P2">Elabore um programa para acionar um LED quando o botão A for pressionado 5 vezes, utilizando o temporizador como contador. Quando o valor da contagem atingir 5 vezes, um LED deve ser piscar por 10 segundos na frequência de 10 Hz.</text:p>
        </text:list-item>
      </text:list>
      <text:p text:style-name="P3"/>
      <text:list text:continue-numbering="true" text:style-name="WWNum3">
        <text:list-item>
          <text:p text:style-name="P4">Na questão anterior, implemente o botão B, para mudar a frequência do LED para 1 Hz.</text:p>
        </text:list-item>
      </text:list>
      <text:p text:style-name="List_20_Paragraph"/>
      <text:p text:style-name="P5"/>
      <text:list xml:id="list150613713554583" text:continue-numbering="true" text:style-name="WWNum3">
        <text:list-item>
          <text:p text:style-name="P4">Modifique o exemplo de código apresentado na videoaula (reproduzido abaixo) para controlar os três LEDs RGB da placa BitDogLab usando o módulo PWM e interrupções, seguindo as orientações a seguir:</text:p>
        </text:list-item>
      </text:list>
      <text:list text:style-name="WWNum4">
        <text:list-item>
          <text:p text:style-name="P6"><text:s/>O LED vermelho deve ser acionado com um PWM de 1kHz. O duty cycle deve ser iniciado em 5% e atualizado a cada 2 segundos em incrementos de 5%. Quando atingir o valor máximo, deve retornar a 5%.</text:p>
        </text:list-item>
        <text:list-item>
          <text:p text:style-name="P7">O LED azul deve ser acionado com um PWM de 10kHz.</text:p>
        </text:list-item>
      </text:list>
      <text:p text:style-name="P3"/>
      <text:list text:continue-list="list150613713554583" text:style-name="WWNum3">
        <text:list-item>
          <text:p text:style-name="P2">Refaça o programa pratico 01 presente no Ebook do Capítulo de ADC, mude a unidade de medida da temperatura de celsius para fahrenheit.</text:p>
        </text:list-item>
      </text:list>
      <text:p text:style-name="P3"/>
      <text:list text:continue-numbering="true" text:style-name="WWNum3">
        <text:list-item>
          <text:p text:style-name="P2">Como o ADC converte sinais analógicos do joystick em valores digitais no exemplo 02?</text:p>
        </text:list-item>
      </text:list>
      <text:p text:style-name="P8"/>
      <text:p text:style-name="P8"><text:tab/><text:span text:style-name="T1">O joystick é formado por 2 potenciômetros, que são alimentados a uma tensão de 3,3V e captam movimentos nos dois eixos (x e y), fazendo variar proporcionalmente a resistência em cada eixo, conforme movimento (horizontal ou vertical) onde a precisão de 12 bits do módulo ADC do RP2040 define a posição conforme a leitura: </text:span><text:span text:style-name="T2">a tensão varia de 0V a 3,3V e, proporcionalmente, a leitura identificada varia de 0 a 4095 </text:span><text:span text:style-name="T3">(daí para binário, hexadecimal ou octal, conforme interesse)</text:span><text:span text:style-name="T2">. Com essa leitura, o microcontrolador pode executar ações diversas, como determinar a posição de um cursor em um display ou a intensidade de brilho de um led, por exempl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2e74b5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2e74b5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2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9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0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4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6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7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4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8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e Rogerio Maciel Ferreira Filho</meta:initial-creator>
    <meta:editing-cycles>3</meta:editing-cycles>
    <meta:creation-date>2026-03-17T21:04:00</meta:creation-date>
    <dc:date>2026-03-23T15:06:12.026967800</dc:date>
    <meta:editing-duration>PT20M35S</meta:editing-duration>
    <meta:generator>LibreOffice/26.2.1.2$Windows_X86_64 LibreOffice_project/620$Build-2</meta:generator>
    <meta:document-statistic meta:table-count="0" meta:image-count="0" meta:object-count="0" meta:page-count="1" meta:paragraph-count="9" meta:word-count="295" meta:character-count="1672" meta:non-whitespace-character-count="1391"/>
    <meta:user-defined meta:name="AppVersion">16.0000</meta:user-defined>
    <meta:template xlink:type="simple" xlink:actuate="onRequest" xlink:title="Normal" xlink:href=""/>
  </office:meta>
</office:document-meta>
</file>