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20000004315EC21C715248E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9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454.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7pt" fo:break-before="auto" style:use-optimal-row-height="false"/>
    </style:style>
    <style:style style:name="ta1" style:family="table" style:master-page-name="PageStyle_5f_Periodo-Divisor">
      <style:table-properties table:display="true" style:writing-mode="lr-tb"/>
    </style:style>
    <style:style style:name="ta2" style:family="table" style:master-page-name="PageStyle_5f_Periodo-Frequenci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fo:font-size="15pt" fo:font-weight="normal" style:text-underline-style="none" style:text-underline-color="font-color" style:text-line-through-type="none" fo:font-style="normal" style:text-outline="false" fo:color="#ffff00" style:text-position="0% 100%" style:font-name-complex="Arial" style:font-size-asian="15pt" style:font-size-complex="15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Arial" fo:font-size="15pt" fo:font-weight="normal" style:text-underline-style="none" style:text-underline-color="font-color" style:text-line-through-type="none" fo:font-style="normal" style:text-outline="false" style:text-position="0% 100%" style:font-name-complex="Arial" style:font-size-asian="15pt" style:font-size-complex="15pt" style:font-weight-asian="normal" style:font-weight-complex="normal" style:font-style-asian="normal" fo:text-shadow="none" fo:color="#00ffff"/>
    </style:style>
    <style:style style:name="T3" style:family="text">
      <style:text-properties style:font-style-complex="normal" style:font-name="Arial" fo:font-size="15pt" fo:font-weight="normal" style:text-underline-style="none" style:text-underline-color="font-color" style:text-line-through-type="none" fo:font-style="normal" style:text-outline="false" style:text-position="0% 100%" style:font-name-complex="Arial" style:font-size-asian="15pt" style:font-size-complex="15pt" style:font-weight-asian="normal" style:font-weight-complex="normal" style:font-style-asian="normal" fo:text-shadow="none" fo:color="#ffff00"/>
    </style:style>
    <style:style style:name="T4" style:family="text">
      <style:text-properties style:font-style-complex="normal" style:font-name="Arial" fo:font-size="15pt" fo:font-weight="normal" style:text-underline-style="none" style:text-underline-color="font-color" style:text-line-through-type="none" fo:font-style="normal" style:text-outline="false" style:text-position="0% 100%" style:font-name-complex="Arial" style:font-size-asian="15pt" style:font-size-complex="15pt" style:font-weight-asian="normal" style:font-weight-complex="normal" style:font-style-asian="normal" fo:text-shadow="none" fo:color="#00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iodo-Divis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>
            <draw:frame table:end-cell-address="'Periodo-Divisor'.C4" table:end-x="115.17pt" table:end-y="12.73pt" draw:z-index="0" draw:name="image1.png" draw:style-name="gr1" draw:text-style-name="P1" svg:width="380.98pt" svg:height="59.22pt" svg:x="2.24pt" svg:y="0.74pt">
              <draw:image xlink:href="Pictures/10000201000001B20000004315EC21C715248E9B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2">
          <table:table-cell table:style-name="ce3" office:value-type="string" calcext:value-type="string">
            <text:p>Clock Base</text:p>
          </table:table-cell>
          <table:table-cell table:style-name="ce7" office:value-type="float" office:value="125000000" calcext:value-type="float">
            <text:p>125000000</text:p>
          </table:table-cell>
          <table:table-cell table:style-name="ce11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rap (PERIODO)</text:p>
          </table:table-cell>
          <table:table-cell table:style-name="ce8" office:value-type="float" office:value="65535" calcext:value-type="float">
            <text:p>65535</text:p>
          </table:table-cell>
          <table:table-cell table:style-name="ce11" office:value-type="string" calcext:value-type="string">
            <text:p>Numero Inteiro (Valor máximo: 65535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kdiv (DIVISOR)</text:p>
          </table:table-cell>
          <table:table-cell table:style-name="ce8" office:value-type="float" office:value="255.9375" calcext:value-type="float">
            <text:p>255.9375</text:p>
          </table:table-cell>
          <table:table-cell table:style-name="ce11" office:value-type="string" calcext:value-type="string">
            <text:p>Numero <text:s/>com virgula (Valor minimo: 1,0 <text:s text:c="2"/>&lt;=&gt; <text:s text:c="2"/>Valor máximo: 255,9375)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requencia</text:p>
          </table:table-cell>
          <table:table-cell table:style-name="ce9" table:formula="of:=[.B6]/([.B8]*([.B7]+1))" office:value-type="float" office:value="7.452400031" calcext:value-type="float">
            <text:p>7.45</text:p>
          </table:table-cell>
          <table:table-cell table:style-name="ce11" office:value-type="string" calcext:value-type="string">
            <text:p>Hz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SOMENTE AS CELULAS EM AMARELO PODEM SER ALTERADA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3" table:number-rows-spanned="1">
            <text:p><text:span text:style-name="T1">pwm_set_wrap(</text:span><text:span text:style-name="T2">slice</text:span><text:span text:style-name="T3">, </text:span><text:span text:style-name="T4">500</text:span><text:span text:style-name="T3">);           // Configura o valor máximo do contador (período do PWM)</text:span></text:p>
            <text:p><text:span text:style-name="T1">pwm_set_clkdiv(</text:span><text:span text:style-name="T2">slice</text:span><text:span text:style-name="T3">, </text:span><text:span text:style-name="T4">49.9</text:span><text:span text:style-name="T3">);    // Define o divisor de clock do PWM</text:span>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Exemplo: Para wrap = 500 / clkdiv = 49.9, <text:s/>temos uma frequencia de 5000 Hz</text:p>
          </table:table-cell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odo-Frequencia" table:style-name="ta2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>
            <draw:frame table:end-cell-address="'Periodo-Frequencia'.C4" table:end-x="116.05pt" table:end-y="14.23pt" draw:z-index="0" draw:name="image1.png" draw:style-name="gr1" draw:text-style-name="P1" svg:width="380.98pt" svg:height="59.22pt" svg:x="4.51pt" svg:y="2.24pt">
              <draw:image xlink:href="Pictures/10000201000001B20000004315EC21C715248E9B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2">
          <table:table-cell table:style-name="ce3" office:value-type="string" calcext:value-type="string">
            <text:p>Clock Base</text:p>
          </table:table-cell>
          <table:table-cell table:style-name="ce7" office:value-type="float" office:value="125000000" calcext:value-type="float">
            <text:p>125000000</text:p>
          </table:table-cell>
          <table:table-cell table:style-name="ce11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rap (PERIODO)</text:p>
          </table:table-cell>
          <table:table-cell table:style-name="ce8" office:value-type="float" office:value="65535" calcext:value-type="float">
            <text:p>65535</text:p>
          </table:table-cell>
          <table:table-cell table:style-name="ce11" office:value-type="string" calcext:value-type="string">
            <text:p>Numero Inteiro (Valor máximo: 65535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kdiv (DIVISOR)</text:p>
          </table:table-cell>
          <table:table-cell table:style-name="ce12" table:formula="of:=IF(([.B6]/([.B9]*([.B7]+1)))&lt;=255.9375;[.B6]/([.B9]*([.B7]+1));&quot;Excede o valor máximo&quot;)" office:value-type="string" office:string-value="Excede o valor máximo" calcext:value-type="string">
            <text:p>Excede o valor máximo</text:p>
          </table:table-cell>
          <table:table-cell table:style-name="ce11" office:value-type="string" calcext:value-type="string">
            <text:p>Numero <text:s/>com virgula (Valor minimo: 1,0 <text:s text:c="2"/>&lt;=&gt; <text:s text:c="2"/>Valor máximo: 255,9375)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requencia</text:p>
          </table:table-cell>
          <table:table-cell table:style-name="ce8" office:value-type="float" office:value="7.45" calcext:value-type="float">
            <text:p>7.45</text:p>
          </table:table-cell>
          <table:table-cell table:style-name="ce11" office:value-type="string" calcext:value-type="string">
            <text:p>Hz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SOMENTE AS CELULAS EM AMARELO PODEM SER ALTERADA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3" table:number-rows-spanned="1">
            <text:p><text:span text:style-name="T1">pwm_set_wrap(</text:span><text:span text:style-name="T2">slice</text:span><text:span text:style-name="T3">, </text:span><text:span text:style-name="T4">500</text:span><text:span text:style-name="T3">);           // Configura o valor máximo do contador (período do PWM)</text:span></text:p>
            <text:p><text:span text:style-name="T1">pwm_set_clkdiv(</text:span><text:span text:style-name="T2">slice</text:span><text:span text:style-name="T3">, </text:span><text:span text:style-name="T4">49.9</text:span><text:span text:style-name="T3">);    // Define o divisor de clock do PWM</text:span>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Exemplo: Para wrap = 500 / clkdiv = 49.9, <text:s/>temos uma frequencia de 5000 Hz</text:p>
          </table:table-cell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iodo-Divisor" style:display-name="PageStyle_Periodo-Divi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iodo-Frequencia" style:display-name="PageStyle_Periodo-Frequenc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" meta:object-count="2"/>
    <meta:generator>LibreOfficeDev/6.0.5.2$Linux_X86_64 LibreOffice_project/</meta:generator>
  </office:meta>
</office:document-meta>
</file>