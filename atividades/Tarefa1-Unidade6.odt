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00000032037FC9B88.jpg" manifest:media-type="image/jpeg"/>
  <manifest:file-entry manifest:full-path="Pictures/10000000000001F90000018E8DC497BE.jpg" manifest:media-type="image/jpeg"/>
  <manifest:file-entry manifest:full-path="Pictures/10000000000004930000035C2035BDE5.jpg" manifest:media-type="image/jpeg"/>
  <manifest:file-entry manifest:full-path="Pictures/1000000000000379000002D060770A3F.jpg" manifest:media-type="image/jpeg"/>
  <manifest:file-entry manifest:full-path="Pictures/10000000000004000000040039A7B09F.jpg" manifest:media-type="image/jpeg"/>
  <manifest:file-entry manifest:full-path="Pictures/10000000000002BF000002748818D680.jpg" manifest:media-type="image/jpeg"/>
  <manifest:file-entry manifest:full-path="Pictures/100000000000065F0000035C71B6B859.jpg" manifest:media-type="image/jpeg"/>
  <manifest:file-entry manifest:full-path="Pictures/1000000000000258000001519E89AAFE.jpg" manifest:media-type="image/jpeg"/>
  <manifest:file-entry manifest:full-path="Pictures/10000000000004F20000035CA9547117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a1595" officeooo:paragraph-rsid="000a1595" style:font-size-asian="18pt" style:font-weight-asian="bold" style:font-size-complex="18pt" style:font-weight-complex="bold"/>
    </style:style>
    <style:style style:name="P2" style:family="paragraph" style:parent-style-name="Standard">
      <style:text-properties officeooo:rsid="000a1595" officeooo:paragraph-rsid="000a1595"/>
    </style:style>
    <style:style style:name="P3" style:family="paragraph" style:parent-style-name="Standard">
      <style:text-properties fo:font-weight="bold" officeooo:rsid="000a1595" officeooo:paragraph-rsid="000a1595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rsid="000a1595" officeooo:paragraph-rsid="000a1595"/>
    </style:style>
    <style:style style:name="P5" style:family="paragraph" style:parent-style-name="Heading_20_1">
      <style:text-properties officeooo:rsid="000a1595" officeooo:paragraph-rsid="000a1595"/>
    </style:style>
    <style:style style:name="P6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0a1595"/>
    </style:style>
    <style:style style:name="P7" style:family="paragraph" style:parent-style-name="Text_20_body">
      <style:paragraph-properties fo:margin-top="0cm" fo:margin-bottom="0cm" style:contextual-spacing="false"/>
      <style:text-properties officeooo:rsid="000a1595"/>
    </style:style>
    <style:style style:name="P8" style:family="paragraph" style:parent-style-name="Text_20_body">
      <style:paragraph-properties fo:text-align="justify" style:justify-single-word="false"/>
      <style:text-properties officeooo:rsid="000a1595"/>
    </style:style>
    <style:style style:name="P9" style:family="paragraph" style:parent-style-name="Heading_20_1">
      <style:text-properties officeooo:rsid="000a1595"/>
    </style:style>
    <style:style style:name="P10" style:family="paragraph" style:parent-style-name="Text_20_body">
      <style:text-properties officeooo:rsid="000a1595"/>
    </style:style>
    <style:style style:name="P11" style:family="paragraph" style:parent-style-name="Text_20_body" style:list-style-name="L1">
      <style:paragraph-properties fo:margin-top="0cm" fo:margin-bottom="0cm" style:contextual-spacing="false"/>
      <style:text-properties officeooo:rsid="000a1595"/>
    </style:style>
    <style:style style:name="P12" style:family="paragraph" style:parent-style-name="Text_20_body" style:list-style-name="L1">
      <style:paragraph-properties fo:text-align="justify" style:justify-single-word="false"/>
      <style:text-properties officeooo:rsid="000a1595"/>
    </style:style>
    <style:style style:name="P13" style:family="paragraph" style:parent-style-name="Text_20_body" style:list-style-name="L2">
      <style:paragraph-properties fo:margin-top="0cm" fo:margin-bottom="0cm" style:contextual-spacing="false" fo:text-align="justify" style:justify-single-word="false"/>
      <style:text-properties officeooo:rsid="000a1595"/>
    </style:style>
    <style:style style:name="P14" style:family="paragraph" style:parent-style-name="Text_20_body" style:list-style-name="L2">
      <style:paragraph-properties fo:text-align="justify" style:justify-single-word="false"/>
      <style:text-properties officeooo:rsid="000a1595"/>
    </style:style>
    <style:style style:name="P15" style:family="paragraph" style:parent-style-name="Standard">
      <style:paragraph-properties fo:text-align="justify" style:justify-single-word="false"/>
      <style:text-properties officeooo:rsid="000a1595" officeooo:paragraph-rsid="000a1595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MBARCATECH</text:p>
      <text:p text:style-name="P2"/>
      <text:p text:style-name="P3">ALUNO: ALENCAR JÚNIOR</text:p>
      <text:p text:style-name="P2"/>
      <text:p text:style-name="P4">TAREFA 1 DA UNIDADE 6</text:p>
      <text:p text:style-name="P2"/>
      <text:h text:style-name="P5" text:outline-level="1"><text:span text:style-name="Strong_20_Emphasis">1. Descrição do Problema Prático</text:span></text:h>
      <text:p text:style-name="P6"><draw:frame draw:style-name="fr1" draw:name="Figura1" text:anchor-type="as-char" svg:width="5.461cm" svg:height="3.639cm" draw:z-index="0"><draw:image xlink:href="Pictures/10000000000004B00000032037FC9B88.jpg" xlink:type="simple" xlink:show="embed" xlink:actuate="onLoad" draw:mime-type="image/jpeg"/><svg:title>https://images.openai.com/static-rsc-4/Uvinz0mx_dAH6enKL31Zvo3-L6rqZkmjREhWGMNrQZq3DCN4NF8-kWJ4sZb7AitgdmPbIxr965YGYrPR1e35MQWV9JshnCMw-hp2yKE62ghvfo5dknnGLvVMr2BIooQad1IDc0MGCE3n4JkAJAZU_hWF1zxS-Y0ogL249Ro106pziIvE7tf_qiP8WLEaU_RR?purpose=fullsize</svg:title></draw:frame><text:s/><draw:frame draw:style-name="fr2" draw:name="Figura2" text:anchor-type="as-char" svg:y="-3.639cm" svg:width="4.665cm" svg:height="3.678cm" draw:z-index="7"><draw:image xlink:href="Pictures/10000000000001F90000018E8DC497BE.jpg" xlink:type="simple" xlink:show="embed" xlink:actuate="onLoad" draw:mime-type="image/jpeg"/><svg:title>https://images.openai.com/static-rsc-4/fxzALDmYIsfM3936kV716VAglhBH63gC4xkclbJMvSgChW4FLP3dPjU6XGI2TVw0kACUfMDuKShMrIcxT3_7IwRgKKG5Ik6iESJrsT6MO5DDS-ip8sh7A-OXAGxC5DSfWytMVFU-adBCx9f_ZLLqs68DB8zqpC676Yp14POU8wFV9kXUKp_Ai4w575YzEs06?purpose=fullsize</svg:title></draw:frame><text:s/><draw:frame draw:style-name="fr1" draw:name="Figura3" text:anchor-type="as-char" svg:width="3.649cm" svg:height="3.649cm" draw:z-index="8"><draw:image xlink:href="Pictures/10000000000004000000040039A7B09F.jpg" xlink:type="simple" xlink:show="embed" xlink:actuate="onLoad" draw:mime-type="image/jpeg"/><svg:title>https://images.openai.com/static-rsc-4/Z_LQiQytTBUFqUW1_m6f8IfQgEngOgnyacxLi-UnvuaFWShxhzBJCJwKLNRQViKF_3ItpM0vp-xDkWKhAo_a_NEKwHSjlnimhK14ucBhwe7pKYhH6mk4QiR_N6OGUrSlONRhqrVateXxtmEFdQiRHUayADASgNsZRnXHpLX0TXj9a4ln1Re67IY8gr5yBOhJ?purpose=fullsize</svg:title></draw:frame></text:p>
      <text:p text:style-name="P7"/>
      <text:p text:style-name="P8"><text:tab/>A manutenção de hortas residenciais é uma prática cada vez mais comum, especialmente entre pessoas que buscam alimentação saudável e sustentável. No entanto, um problema recorrente enfrentado por esses indivíduos é a dificuldade de manter a irrigação adequada das plantas, principalmente quando passam longos períodos fora de casa devido a trabalho, viagens ou compromissos pessoais.</text:p>
      <text:p text:style-name="P8"><text:tab/>A irrigação manual exige constância e atenção, pois diferentes plantas possuem necessidades hídricas específicas. A ausência de rega por poucos dias pode levar ao estresse hídrico, comprometendo o crescimento das plantas e, em casos mais extremos, causando sua morte. Por outro lado, o excesso de água também é prejudicial, podendo provocar o apodrecimento das raízes.</text:p>
      <text:p text:style-name="P8"><text:tab/>Outro fator relevante é a variabilidade ambiental. Temperatura, umidade do ar e incidência solar influenciam diretamente a evaporação da água no solo. Isso torna inviável um modelo fixo de irrigação, exigindo um controle adaptativo e inteligente.</text:p>
      <text:p text:style-name="P8"><text:tab/>Além disso, muitas pessoas não possuem conhecimento técnico para implementar soluções automatizadas ou sistemas tradicionais de irrigação, que podem ser caros e complexos. Dessa forma, existe uma necessidade clara de uma solução acessível, automatizada e eficiente que permita monitorar e controlar a irrigação remotamente.</text:p>
      <text:p text:style-name="P8"><text:tab/>A Internet das Coisas (IoT) surge como uma alternativa viável para resolver esse problema, permitindo a integração de sensores, atuadores e conectividade, proporcionando um sistema autônomo e inteligente capaz de manter a horta saudável mesmo na ausência do usuário.</text:p>
      <text:h text:style-name="P9" text:outline-level="1"><text:span text:style-name="Strong_20_Emphasis"/></text:h>
      <text:p text:style-name="P10"><text:span text:style-name="Strong_20_Emphasis"/></text:p>
      <text:p text:style-name="P10"><text:span text:style-name="Strong_20_Emphasis"/></text:p>
      <text:h text:style-name="P9" text:outline-level="1"><text:soft-page-break/><text:span text:style-name="Strong_20_Emphasis">2. Esboço da Solução IoT</text:span></text:h>
      <text:p text:style-name="P10"><text:span text:style-name="Strong_20_Emphasis"/></text:p>
      <text:p text:style-name="P6"><draw:frame draw:style-name="fr1" draw:name="Figura4" text:anchor-type="as-char" svg:width="13.069cm" svg:height="10.585cm" draw:z-index="1"><draw:image xlink:href="Pictures/1000000000000379000002D060770A3F.jpg" xlink:type="simple" xlink:show="embed" xlink:actuate="onLoad" draw:mime-type="image/jpeg"/><svg:title>https://images.openai.com/static-rsc-4/SIcRVpQiDQ1i4csTGsU5jEaag1Mm_xPMPq359JBWMdNYCYsqF3w97osJQHRYaAbVhHsjm2T1QnmobD3p_MvRh3JyRpTb38PDgCcoys4KWS8MxIo5yhBuAH_xIspiwI-tLuDirC_VOgXhIZPtI0gKQa45IyzGyw9jz2qg9O7rLqfDBgXJgYro7JsZPyrpkDus?purpose=fullsize</svg:title></draw:frame></text:p>
      <text:p text:style-name="P6"/>
      <text:p text:style-name="P6"><draw:frame draw:style-name="fr1" draw:name="Figura5" text:anchor-type="as-char" svg:width="15.602cm" svg:height="8.225cm" draw:z-index="2"><draw:image xlink:href="Pictures/100000000000065F0000035C71B6B859.jpg" xlink:type="simple" xlink:show="embed" xlink:actuate="onLoad" draw:mime-type="image/jpeg"/><svg:title>https://images.openai.com/static-rsc-4/H6LpV8YKtoYUSrstI4e0DqVFtdDpqjWkZY74O3kbqCWa6bmp29TJNmabm3rhu-HWO8IANIX3iqp4AEMj2zlz73kq1CfUkQqkxqqgHvbTS2lIQyZvC173em5S-8Is9i38UMLYJvWF40qKjAMDRbPKYUnXcAt4shxfF6FxoFmF20D0a6LH25cNJ-t-2iO03xTi?purpose=fullsize</svg:title></draw:frame></text:p>
      <text:p text:style-name="P6"><text:soft-page-break/><draw:frame draw:style-name="fr1" draw:name="Figura6" text:anchor-type="as-char" svg:width="12.241cm" svg:height="8.991cm" draw:z-index="3"><draw:image xlink:href="Pictures/10000000000004930000035C2035BDE5.jpg" xlink:type="simple" xlink:show="embed" xlink:actuate="onLoad" draw:mime-type="image/jpeg"/><svg:title>https://images.openai.com/static-rsc-4/hNWCUlehVm4zRpdUZ6FZWAuXo_xMv04xlQBDQzTN6tAt7fuCBvMj6hoB8KPS572APkRPsSBrncYG4axNup7A__pjkF-9nR4rkroCRlBOAnvP8o7SYSso7PxvaGGBaTMG1iG8LFLjwKXPFC-PIjlHe_t9q_G4YcGH1q-2WSIGeCHc7zt20UVY--wMqlcQhmSs?purpose=fullsize</svg:title></draw:frame></text:p>
      <text:p text:style-name="P10"/>
      <text:p text:style-name="P8"><text:tab/>A solução proposta consiste em um sistema de irrigação automatizado baseado em IoT, utilizando um microcontrolador como unidade central de processamento. Um exemplo adequado é o ESP32, devido à sua conectividade integrada e baixo custo.</text:p>
      <text:p text:style-name="P10"><text:tab/>O sistema será composto pelos seguintes componentes:</text:p>
      <text:list text:style-name="L1">
        <text:list-item>
          <text:p text:style-name="P11"><text:span text:style-name="Strong_20_Emphasis">Sensores:</text:span> </text:p>
          <text:list>
            <text:list-item>
              <text:p text:style-name="P11">Sensor de umidade do solo (analógico) </text:p>
            </text:list-item>
            <text:list-item>
              <text:p text:style-name="P11">Sensor de temperatura e umidade do ar (ex: DHT22) </text:p>
            </text:list-item>
            <text:list-item>
              <text:p text:style-name="P11">Sensor de nível de água no reservatório </text:p>
            </text:list-item>
          </text:list>
        </text:list-item>
        <text:list-item>
          <text:p text:style-name="P11"><text:span text:style-name="Strong_20_Emphasis">Atuadores:</text:span> </text:p>
          <text:list>
            <text:list-item>
              <text:p text:style-name="P11">Bomba d’água ou válvula solenóide </text:p>
            </text:list-item>
            <text:list-item>
              <text:p text:style-name="P11">Relé para acionamento da bomba </text:p>
            </text:list-item>
          </text:list>
        </text:list-item>
        <text:list-item>
          <text:p text:style-name="P11"><text:span text:style-name="Strong_20_Emphasis">Comunicação:</text:span> </text:p>
          <text:list>
            <text:list-item>
              <text:p text:style-name="P12">Protocolo Wi-Fi (MQTT ou HTTP) para envio de dados a uma plataforma (ex: Firebase ou servidor web) </text:p>
            </text:list-item>
          </text:list>
        </text:list-item>
      </text:list>
      <text:p text:style-name="P8"><text:tab/>O ESP32 utilizará seus periféricos ADC (Conversor Analógico-Digital) para leitura do sensor de umidade do solo, GPIOs digitais para controle do relé e comunicação via Wi-Fi para integração com um aplicativo móvel.</text:p>
      <text:p text:style-name="P10"><text:tab/>O sistema funcionará da seguinte forma:</text:p>
      <text:list text:style-name="L2">
        <text:list-item>
          <text:p text:style-name="P13">O sensor de umidade do solo mede continuamente a umidade. </text:p>
        </text:list-item>
        <text:list-item>
          <text:p text:style-name="P13">Se o valor estiver abaixo de um limite configurado, o microcontrolador aciona a bomba de água automaticamente. </text:p>
        </text:list-item>
        <text:list-item>
          <text:p text:style-name="P13">Dados ambientais são enviados para a nuvem. </text:p>
        </text:list-item>
        <text:list-item>
          <text:p text:style-name="P14">O usuário pode monitorar e, se necessário, controlar remotamente via aplicativo. </text:p>
        </text:list-item>
      </text:list>
      <text:p text:style-name="P8"><text:tab/>Interrupções podem ser utilizadas para eventos críticos, como nível baixo de água no reservatório, evitando danos à bomba.</text:p>
      <text:p text:style-name="P8"><text:soft-page-break/><text:tab/>Essa solução garante irrigação eficiente, economia de água e autonomia, sendo ideal para usuários com rotinas intensas.</text:p>
      <text:h text:style-name="P9" text:outline-level="1"><text:span text:style-name="Strong_20_Emphasis">3. Fluxograma do Software Embarcado</text:span></text:h>
      <text:p text:style-name="P10"><text:span text:style-name="Strong_20_Emphasis"/></text:p>
      <text:p text:style-name="P6"><draw:frame draw:style-name="fr1" draw:name="Figura7" text:anchor-type="as-char" svg:width="14.245cm" svg:height="8.001cm" draw:z-index="4"><draw:image xlink:href="Pictures/1000000000000258000001519E89AAFE.jpg" xlink:type="simple" xlink:show="embed" xlink:actuate="onLoad" draw:mime-type="image/jpeg"/><svg:title>https://images.openai.com/static-rsc-4/ZT1dYZaXLBNtg_ud9kL1O8VtU9eDraYbvkNiilIyXKO05fP9PfR6wqGmiI2uiJlxxImB6beSFXNeAHHw3XT6FF2XX8nl2vh-ywLIrW2JeIXf2md5lcJWADaOi3wS7LXRghEfqauYtYsRhHWn4LFrJPSeE3hLbNLQKbSB0qcL1540t_s2-Fn5WGzPn00xRuny?purpose=fullsize</svg:title></draw:frame></text:p>
      <text:p text:style-name="P6"/>
      <text:p text:style-name="P6"><draw:frame draw:style-name="fr1" draw:name="Figura8" text:anchor-type="as-char" svg:width="14.146cm" svg:height="12.637cm" draw:z-index="5"><draw:image xlink:href="Pictures/10000000000002BF000002748818D680.jpg" xlink:type="simple" xlink:show="embed" xlink:actuate="onLoad" draw:mime-type="image/jpeg"/><svg:title>https://images.openai.com/static-rsc-4/2DJT4tlurDzJdLyzCnymRHcuuA4oNx7yEsJPkr88bH934G8Un0HkwgqG4q_R0gr7P5VS04WGPVCRmIXIK-Tgn7m_a0magaEJqelYYMQ6V0ZgKwYRBbLrWCNSk2c3uFCkTzkRUbSoBs3dKWFl-WpXs1GmjIjVEhnttjez06161kvgQRDn-dYZvLDNwRxSOa-3?purpose=fullsize</svg:title></draw:frame></text:p>
      <text:p text:style-name="P6"><text:soft-page-break/><draw:frame draw:style-name="fr1" draw:name="Figura9" text:anchor-type="as-char" svg:width="14.903cm" svg:height="10.123cm" draw:z-index="6"><draw:image xlink:href="Pictures/10000000000004F20000035CA9547117.jpg" xlink:type="simple" xlink:show="embed" xlink:actuate="onLoad" draw:mime-type="image/jpeg"/><svg:title>https://images.openai.com/static-rsc-4/6n1f9QJjFqcnXakmrIxkLrVxrxbSuOuh2P-_fVIvOD3Tmu-vycXwi4V9dexknq9PPk0gyqIW_17gmSrmkpr__pWxwP80sq88sXlvXYQ7jwh0GlZxODiZFlkPOI7dyulgabFl3ZUPsouu1MItjWwrbtJS5Z0ZJqo12kZ4ZjVZjAujNUdmqQ0yxShnaqTr_Olj?purpose=fullsize</svg:title></draw:frame></text:p>
      <text:p text:style-name="P10"/>
      <text:p text:style-name="P8"><text:tab/>O software embarcado será responsável por realizar a leitura dos sensores, processar os dados e tomar decisões de acionamento da irrigação.</text:p>
      <text:p text:style-name="P8"><text:tab/>O fluxo inicia com a inicialização do sistema, configuração dos pinos GPIO, ADC e conexão Wi-Fi. Em seguida, o sistema entra em um loop principal contínuo.</text:p>
      <text:p text:style-name="P8"><text:tab/>Dentro do loop, o microcontrolador realiza a leitura periódica da umidade do solo. Caso o valor esteja abaixo do limite mínimo definido, o sistema verifica o nível de água no reservatório. Se houver água suficiente, a bomba é acionada por um tempo determinado ou até atingir o nível ideal de umidade.</text:p>
      <text:p text:style-name="P8"><text:tab/>Paralelamente, dados como temperatura, umidade do ar e status do sistema são enviados para a nuvem. O sistema também pode receber comandos remotos do usuário.</text:p>
      <text:p text:style-name="P8"><text:tab/>Caso seja detectado nível baixo de água, uma interrupção pode ser acionada para desligar imediatamente a bomba e enviar um alerta.</text:p>
      <text:p text:style-name="P8"><text:tab/>Esse fluxo garante operação autônoma, segura e eficiente, com capacidade de monitoramento remoto e resposta em tempo real.</text:p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2T00:40:03.252160100</meta:creation-date>
    <dc:date>2026-04-12T00:53:43.896752000</dc:date>
    <meta:editing-duration>PT12M16S</meta:editing-duration>
    <meta:editing-cycles>2</meta:editing-cycles>
    <meta:generator>LibreOffice/26.2.1.2$Windows_X86_64 LibreOffice_project/620$Build-2</meta:generator>
    <meta:document-statistic meta:table-count="0" meta:image-count="9" meta:object-count="0" meta:page-count="5" meta:paragraph-count="43" meta:word-count="640" meta:character-count="4167" meta:non-whitespace-character-count="3544"/>
  </office:meta>
</office:document-meta>
</file>