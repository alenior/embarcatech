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A50000004498FFEBAB0.png" manifest:media-type="image/png"/>
  <manifest:file-entry manifest:full-path="Pictures/10000001000000F6000000301E7D4D7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text-align="justify" style:justify-single-word="false" loext:word-spacing-minimum="75%" loext:word-spacing-maximum="133%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 fo:text-indent="1.249cm" style:auto-text-indent="false" loext:word-spacing-minimum="75%" loext:word-spacing-maximum="133%"/>
    </style:style>
    <style:style style:name="P6" style:family="paragraph" style:parent-style-name="Standard">
      <style:paragraph-properties fo:line-height="115%" fo:text-align="justify" style:justify-single-word="false" loext:word-spacing-minimum="75%" loext:word-spacing-maximum="133%"/>
    </style:style>
    <style:style style:name="P7" style:family="paragraph" style:parent-style-name="Standard">
      <style:paragraph-properties fo:margin-left="1.249cm" fo:line-height="115%" fo:text-align="justify" style:justify-single-word="false" loext:word-spacing-minimum="75%" loext:word-spacing-maximum="133%"/>
    </style:style>
    <style:style style:name="P8" style:family="paragraph" style:parent-style-name="Standard">
      <style:paragraph-properties fo:line-height="115%" fo:text-align="justify" style:justify-single-word="false" loext:word-spacing-minimum="75%" loext:word-spacing-maximum="133%"/>
      <style:text-properties fo:font-size="12pt" style:font-size-asian="12pt" style:font-name-complex="Calibri1" style:font-size-complex="12pt"/>
    </style:style>
    <style:style style:name="P9" style:family="paragraph" style:parent-style-name="Standard">
      <style:paragraph-properties fo:line-height="115%" fo:text-align="end" style:justify-single-word="false"/>
    </style:style>
    <style:style style:name="P10" style:family="paragraph" style:parent-style-name="Standard">
      <style:paragraph-properties fo:line-height="115%" fo:text-align="end" style:justify-single-word="false"/>
      <style:text-properties fo:font-size="12pt" style:font-size-asian="12pt" style:font-name-complex="Calibri1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officeooo:rsid="0009ad28" style:font-size-asian="10pt" style:font-weight-asian="bold" style:font-name-complex="Calibri1" style:font-size-complex="10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09ad28" style:font-size-asian="12pt" style:font-weight-asian="bold" style:font-name-complex="Calibri1" style:font-size-complex="12pt" style:font-weight-complex="bold"/>
    </style:style>
    <style:style style:name="T6" style:family="text">
      <style:text-properties fo:font-size="10pt" style:font-size-asian="10pt" style:font-name-complex="Calibri1" style:font-size-complex="10pt"/>
    </style:style>
    <style:style style:name="T7" style:family="text">
      <style:text-properties fo:font-family="'Segoe UI'" style:font-family-generic="swiss" style:font-pitch="variable" fo:font-size="9pt" style:font-size-asian="9pt" style:font-family-complex="'Segoe UI'" style:font-family-generic-complex="system" style:font-pitch-complex="variable" style:font-size-complex="9pt"/>
    </style:style>
    <style:style style:name="T8" style:family="text">
      <style:text-properties fo:font-size="12pt" fo:font-weight="bold" officeooo:rsid="000b8889" style:font-size-asian="12pt" style:font-weight-asian="bold" style:font-name-complex="Calibri1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TERMO DE RESPONSABILIDADE SOBRE A GUARDA E USO DE EQUIPAMENTOS</text:span><text:span text:style-name="T1"/></text:p>
      <text:p text:style-name="P3" loext:marker-style-name="T1"><text:span text:style-name="T1">Recebimento e Uso do Kit de Desenvolvimento em Sistemas Embarcados</text:span><text:span text:style-name="T1"/></text:p>
      <text:p text:style-name="P3" loext:marker-style-name="T2"><text:span text:style-name="T1">Programa EmbarcaTech</text:span><text:span text:style-name="T1"/></text:p>
      <text:p text:style-name="P4" loext:marker-style-name="T1"/>
      <text:p text:style-name="P5" loext:marker-style-name="T2"><text:span text:style-name="T1">Pelo presente Termo de Uso e Responsabilidade</text:span><text:span text:style-name="T2">, eu, </text:span><text:span text:style-name="T3">JOSÉ DE ALENCAR DE SOUSA JÚNIOR</text:span><text:span text:style-name="T4">,</text:span><text:span text:style-name="T2"> inscrito(a) no CPF sob o nº </text:span><text:span text:style-name="T5">00492573310</text:span><text:span text:style-name="T2">, residente no endereço </text:span><text:span text:style-name="T5">RUA TOMÁS RODRIGUES, Nº 1451 CASA 24</text:span><text:span text:style-name="T2">, inscrito no Programa de Capacitação em Sistemas Embarcados </text:span><text:span text:style-name="T1">EMBARCATECH</text:span><text:span text:style-name="T2">, </text:span><text:span text:style-name="T1">assumo a responsabilidade</text:span><text:span text:style-name="T2"> pelo recebimento, guarda, uso e conservação, </text:span><text:span text:style-name="T1">a título de concessão temporária, para meu uso exclusivo, conforme determinado na lei</text:span><text:span text:style-name="T2">,</text:span><text:span text:style-name="T6"> </text:span><text:span text:style-name="T2">do kit de desenvolvimento em sistemas embarcados “BitDogLab”, fornecido pelo Programa, para a realização das atividades de Capacitação, comprometendo-me a manter o kit em perfeito estado de conservação e funcionamento, ficando ciente de que:</text:span></text:p>
      <text:p text:style-name="P6" loext:marker-style-name="T1"><text:span text:style-name="T1">1. OBJETO</text:span><text:span text:style-name="T1"/></text:p>
      <text:p text:style-name="P6" loext:marker-style-name="T2"><text:span text:style-name="T2">1.1. EmbarcaTech – Residência em TIC 37 – é um Projeto do Ministério da Ciência, Tecnologia e Inovações (MCTI), com recursos da Lei nº 8.248, de 23 de outubro de 1991, conforme publicação do Programa Residência em TIC 37, DOU 01245.001849/2024-76, coordenado pela Associação para Promoção da Excelência do Software Brasileiro Softex.</text:span><text:span text:style-name="T2"/></text:p>
      <text:p text:style-name="P6" loext:marker-style-name="T2"><text:span text:style-name="T2">1.2. Este termo tem como objeto a concessão temporária do Kit de Desenvolvimento em Sistemas Embarcados, composto por uma placa de embarcado “BitDogLab” e um cabo de conexão USB. Este kit, fornecido pelo Programa EmbarcaTech, é para uso exclusivo no desempenho das atividades durante a capacitação.</text:span><text:span text:style-name="T2"/></text:p>
      <text:p text:style-name="P6" loext:marker-style-name="T1"><text:span text:style-name="T1">2. RESPONSABILIDADES DO ALUNO</text:span><text:span text:style-name="T1"/></text:p>
      <text:p text:style-name="P6" loext:marker-style-name="T2"><text:span text:style-name="T2">2.1. </text:span><text:span text:style-name="T1">Conservação, Uso e Doação do Kit</text:span><text:span text:style-name="T2">: </text:span></text:p>
      <text:p text:style-name="P6" loext:marker-style-name="T2"><text:span text:style-name="T2">2.1.1. Comprometo-me a zelar pela placa entregue pelo Programa EmbarcaTech durante a fase de capacitação, ciente da obrigação de guardar e conservar o kit recebido, não repassando para terceiros a guarda ou responsabilidade pelo uso e conservação, e ciente da obrigação de uso exclusivo na realização das atividades do Programa EmbarcaTech.</text:span><text:span text:style-name="T2"/></text:p>
      <text:p text:style-name="P6" loext:marker-style-name="T2"><text:span text:style-name="T2">2.1.2. Estou ciente de que o kit recebido poderá ser definitivamente de minha posse SOMENTE ao concluir o curso integralmente, mediante comprovação do cumprimento da carga horária mínima de participação e condição para a conclusão do curso. </text:span><text:span text:style-name="T2"/></text:p>
      <text:p text:style-name="P6" loext:marker-style-name="T2"><text:soft-page-break/><text:span text:style-name="T2">2.2. </text:span><text:span text:style-name="T1">Devolução do Kit</text:span><text:span text:style-name="T2">: </text:span></text:p>
      <text:p text:style-name="P6" loext:marker-style-name="T2"><text:span text:style-name="T2">2.2.2. Caso eu não conclua o curso, perca, extravie ou a placa seja roubada, comprometo-me a devolvê-la ou a arcar com o pagamento de uma multa correspondente ao valor estipulado pela coordenação do projeto.</text:span><text:span text:style-name="T2"/></text:p>
      <text:p text:style-name="P7" loext:marker-style-name="T2"><text:span text:style-name="T2">2.2.2.1 Caso não devolva a placa, estou ciente de que terei que pagar uma multa no valor de </text:span><text:span text:style-name="T1">R$ 1.000,00 (mil reais)</text:span><text:span text:style-name="T2">, correspondente ao custo da placa.</text:span></text:p>
      <text:p text:style-name="P6" loext:marker-style-name="T2"><text:span text:style-name="T2">2.3. </text:span><text:span text:style-name="T1">Cuidados com a Placa</text:span><text:span text:style-name="T2">:</text:span></text:p>
      <text:p text:style-name="P6" loext:marker-style-name="T2"><text:span text:style-name="T2">2.3.1. Comprometo-me a cuidar adequadamente da placa, zelando para que não sofra danos, extravios ou qualquer forma de deterioração, salvo desgaste natural pelo uso.</text:span><text:span text:style-name="T2"/></text:p>
      <text:p text:style-name="P6" loext:marker-style-name="T2"><text:span text:style-name="T2">2.3.2. Estou ciente de que sou responsável por quaisquer danos que a placa venha a sofrer devido a mau uso, negligência ou falta de cuidados adequados.</text:span><text:span text:style-name="T2"/></text:p>
      <text:p text:style-name="P6" loext:marker-style-name="T2"><text:span text:style-name="T2">2.4. </text:span><text:span text:style-name="T1">Uso Indevido da Placa</text:span><text:span text:style-name="T2">:</text:span></text:p>
      <text:p text:style-name="P6" loext:marker-style-name="T2"><text:span text:style-name="T2">2.4.1. Concordo em utilizar a placa exclusivamente para as atividades relacionadas a capacitação, sendo expressamente proibido seu uso para quaisquer outras finalidades.</text:span><text:span text:style-name="T2"/></text:p>
      <text:p text:style-name="P6" loext:marker-style-name="T2"><text:span text:style-name="T2">2.4.2. Caso seja constatado uso indevido da placa, reconheço que estou sujeito às penalidades previstas, que podem incluir desde a restituição dos danos até a exclusão da Capacitação.</text:span><text:span text:style-name="T2"/></text:p>
      <text:p text:style-name="P6" loext:marker-style-name="T2"><text:span text:style-name="T2">2.5. </text:span><text:span text:style-name="T1">Roubo, Furto ou Extravio</text:span><text:span text:style-name="T2">:</text:span></text:p>
      <text:p text:style-name="P6" loext:marker-style-name="T2"><text:span text:style-name="T2">2.5.1. Em situações de roubo, furto ou extravio da placa, comprometo-me a informar imediatamente à Coordenação Acadêmica do Programa EmbarcaTech através do e-mail embarcatech@lds.ifce.edu.br, anexando o boletim de ocorrência policial.</text:span><text:span text:style-name="T2"/></text:p>
      <text:p text:style-name="Standard" loext:marker-style-name="T2"><text:span text:style-name="T2">2.5.2. Em situações de roubo, furto ou extravio da placa, o participante não receberá outro kit de desenvolvimento.</text:span><text:span text:style-name="T2"/></text:p>
      <text:p text:style-name="P6" loext:marker-style-name="T2"><text:span text:style-name="T2">2.5.3 Ainda assim, estou ciente de que, nesses casos, será de minha responsabilidade o pagamento de uma multa correspondente ao valor estipulado pela coordenação do projeto.</text:span><text:span text:style-name="T2"/></text:p>
      <text:p text:style-name="P6" loext:marker-style-name="T2"><text:span text:style-name="T2">2. 6. </text:span><text:span text:style-name="T1">Defeito de Fabricação ou Danos Logísticos</text:span><text:span text:style-name="T2">:</text:span></text:p>
      <text:p text:style-name="P6" loext:marker-style-name="T2"><text:span text:style-name="T2">2.6.1. Nos casos de comprovação de problemas técnicos no kit de desenvolvimento em função de defeitos de fabricação ou danos causados no processo de entrega/logística, a ocorrência deve ser informada à Coordenação Acadêmica para que seja feita a análise para posterior solução do problema ou substituição.</text:span><text:span text:style-name="T2"/></text:p>
      <text:p text:style-name="P7" loext:marker-style-name="T2"><text:span text:style-name="T2">2.6.1.1. Ao confirmado o defeito de fabricação ou dano de entrega, e constatada a impossibilidade de conserto, será avaliada a possibilidade de substituição, considerando o prazo do fabricante para nova fabricação do kit e envio.</text:span><text:span text:style-name="T2"/></text:p>
      <text:p text:style-name="P6" loext:marker-style-name="T1"><text:soft-page-break/><text:span text:style-name="T1">3. DISPOSIÇÕES GERAIS</text:span><text:span text:style-name="T1"/></text:p>
      <text:p text:style-name="P6" loext:marker-style-name="T2"><text:span text:style-name="T2">3.1. Este Termo de Responsabilidade é parte integrante das condições de participação na capacitação e deve ser respeitado durante toda a vigência da capacitação.</text:span><text:span text:style-name="T6"><text:line-break/></text:span><text:span text:style-name="T2">3.2. O não cumprimento das responsabilidades aqui estabelecidas poderá resultar em sanções, incluindo, mas não se limitando a cobrança de multa, exclusão da capacitação e impossibilidade de participar de futuras capacitações</text:span><text:span text:style-name="T7"> </text:span><text:span text:style-name="T2">dos programas de residência tecnológica do IFCE promovidos pelo MCTI.</text:span></text:p>
      <text:p text:style-name="P6" loext:marker-style-name="T1"><text:span text:style-name="T1">4. ASSINATURA</text:span><text:span text:style-name="T1"/></text:p>
      <text:p text:style-name="P6" loext:marker-style-name="T2"><text:span text:style-name="T2">4.1 Declaro que li, compreendi e aceito todos os termos e condições estabelecidos neste Termo de Responsabilidade, e comprometo-me a cumpri-los integralmente.</text:span><text:span text:style-name="T2"/></text:p>
      <text:p text:style-name="P6" loext:marker-style-name="T2"><text:span text:style-name="T2">4.2 Este Termo de Responsabilidade será assinado eletronicamente pelo responsável pelo uso da placa, utilizando-se de ferramentas e tecnologias legalmente reconhecidas, conforme disposto na Medida Provisória nº 2.200-2/2001, que institui a Infraestrutura de Chaves Públicas Brasileira (ICP-Brasil), garantindo validade jurídica à assinatura eletrônica.</text:span><text:span text:style-name="T2"/></text:p>
      <text:p text:style-name="P6" loext:marker-style-name="T2"><text:span text:style-name="T2">4.3. A assinatura eletrônica terá a mesma força e efeito que a assinatura física, para todos os fins de direito, ficando as partes desde já cientes de sua responsabilidade quanto à autenticidade e validade das assinaturas realizadas por meio eletrônico.</text:span><text:span text:style-name="T2"/></text:p>
      <text:p text:style-name="P8" loext:marker-style-name="T2"/>
      <text:p text:style-name="P9" loext:marker-style-name="T1"><text:span text:style-name="T1">Fortaleza – CE, </text:span><text:span text:style-name="T8">06</text:span><text:span text:style-name="T1"> de março de 2026.</text:span></text:p>
      <text:p text:style-name="P10" loext:marker-style-name="T2"/>
      <text:p text:style-name="P10" loext:marker-style-name="T2"/>
      <text:p text:style-name="P11" loext:marker-style-name="T1"><text:span text:style-name="T1">________________________________</text:span><text:span text:style-name="T1"/></text:p>
      <text:p text:style-name="P11" loext:marker-style-name="T1"><text:span text:style-name="T1">Nome: </text:span><text:span text:style-name="T8">JOSÉ DE ALENCAR DE SOUSA JÚNIOR</text:span></text:p>
      <text:p text:style-name="P11" loext:marker-style-name="T2"><text:span text:style-name="T1">CPF: </text:span><text:span text:style-name="T8">0049257331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Marginalia" style:family="paragraph" style:parent-style-name="Standard" loext:linked-style-name="Texto_20_de_20_comentário_20_Char" style:class="text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Mention" style:family="text" style:parent-style-name="Default_20_Paragraph_20_Font">
      <style:text-properties fo:color="#2b579a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" text:anchor-type="char" svg:x="12.24cm" svg:y="-0.667cm" svg:width="3.699cm" svg:height="1.536cm" draw:z-index="2"><draw:image xlink:href="Pictures/1000000100000A50000004498FFEBAB0.png" xlink:type="simple" xlink:show="embed" xlink:actuate="onLoad" draw:mime-type="image/png"/><svg:desc>Logotipo

Descrição gerada automaticamente</svg:desc></draw:frame><draw:frame draw:style-name="Mfr1" draw:name="Imagem 2" text:anchor-type="char" svg:x="-1.439cm" svg:y="-0.667cm" svg:width="7.322cm" svg:height="1.429cm" draw:z-index="5"><draw:image xlink:href="Pictures/10000001000000F6000000301E7D4D77.png" xlink:type="simple" xlink:show="embed" xlink:actuate="onLoad" draw:mime-type="image/png"/><svg:desc>SisAE</svg:desc></draw:frame></text:p>
      </style:header>
      <style:footer>
        <text:p text:style-name="MP1" loext:marker-style-name="MT1"/>
        <text:p text:style-name="MP2" loext:marker-style-name="MT2"><text:span text:style-name="MT3">INSTITUTO FEDERAL DE EDUCAÇÃO, CIÊNCIA E TECNOLOGIA DO CEARÁ – IFCE</text:span><text:span text:style-name="MT3"/></text:p>
        <text:p text:style-name="MP2" loext:marker-style-name="MT2"><text:span text:style-name="MT2">Rua Jorge Dumar, 1703, - Bairro Jardim América - CEP 60410-426 - Fortaleza - CE - www.ifce.edu.br.</text:span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e Pontes</meta:initial-creator>
    <meta:editing-cycles>8</meta:editing-cycles>
    <meta:creation-date>2024-12-12T19:39:00</meta:creation-date>
    <dc:date>2026-03-06T07:36:50.123792400</dc:date>
    <meta:editing-duration>PT2H5M34S</meta:editing-duration>
    <meta:generator>LibreOffice/25.8.4.2$Windows_X86_64 LibreOffice_project/290daaa01b999472f0c7a3890eb6a550fd74c6df</meta:generator>
    <meta:document-statistic meta:table-count="0" meta:image-count="2" meta:object-count="0" meta:page-count="3" meta:paragraph-count="39" meta:word-count="877" meta:character-count="5867" meta:non-whitespace-character-count="5022"/>
    <meta:user-defined meta:name="AppVersion">16.0000</meta:user-defined>
    <meta:user-defined meta:name="ContentTypeId">0x01010078446395DB4C05478961EEB16CBDC3F7</meta:user-defined>
    <meta:user-defined meta:name="MediaServiceImageTags"/>
    <meta:template xlink:type="simple" xlink:actuate="onRequest" xlink:title="Normal" xlink:href=""/>
  </office:meta>
</office:document-meta>
</file>